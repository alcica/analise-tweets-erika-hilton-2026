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7.09pt"/>
    </style:style>
    <style:style style:name="co2" style:family="table-column">
      <style:table-column-properties fo:break-before="auto" style:column-width="98.59pt"/>
    </style:style>
    <style:style style:name="co3" style:family="table-column">
      <style:table-column-properties fo:break-before="auto" style:column-width="127.11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weet_url</text:p>
          </table:table-cell>
          <table:table-cell table:style-name="ce1" office:value-type="string" calcext:value-type="string">
            <office:annotation draw:style-name="gr1" draw:text-style-name="P2" svg:width="337.55pt" svg:height="39.29pt" svg:x="436.93pt" svg:y="17.09pt" draw:caption-point-x="-11.54pt" draw:caption-point-y="-16.81pt">
              <dc:date>2026-06-24T00:00:00</dc:date>
              <text:p text:style-name="P1">A variável &lt;engajamento_total&gt; equivale à soma das métricas de interação disponibilizadas pela plataforma X, incluindo curtidas, respostas, citações, repostagens e visualizações.</text:p>
            </office:annotation>
            <text:p>engajamento_total</text:p>
          </table:table-cell>
          <table:table-cell table:style-name="ce8" office:value-type="string" calcext:value-type="string">
            <text:p>data/rest_id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centralreality/status/2031902121327493206" xlink:type="simple">https://x.com/centralreality/status/2031902121327493206</text:a></text:p>
          </table:table-cell>
          <table:table-cell table:style-name="ce7" office:value-type="float" office:value="936114" calcext:value-type="float">
            <text:p>936,114</text:p>
          </table:table-cell>
          <table:table-cell table:style-name="ce6" office:value-type="string" calcext:value-type="string">
            <text:p>2031902121327493206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choquei/status/2031908045404385787" xlink:type="simple">https://x.com/choquei/status/2031908045404385787</text:a></text:p>
          </table:table-cell>
          <table:table-cell table:style-name="ce7" office:value-type="float" office:value="906007" calcext:value-type="float">
            <text:p>906,007</text:p>
          </table:table-cell>
          <table:table-cell table:style-name="ce6" office:value-type="string" calcext:value-type="string">
            <text:p>2031908045404385787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poptime/status/2032217898853261334" xlink:type="simple">https://x.com/poptime/status/2032217898853261334</text:a></text:p>
          </table:table-cell>
          <table:table-cell table:style-name="ce7" office:value-type="float" office:value="691890" calcext:value-type="float">
            <text:p>691,890</text:p>
          </table:table-cell>
          <table:table-cell table:style-name="ce6" office:value-type="string" calcext:value-type="string">
            <text:p>2032217898853261334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cheolseungshine/status/2032230574992060508" xlink:type="simple">https://x.com/cheolseungshine/status/2032230574992060508</text:a></text:p>
          </table:table-cell>
          <table:table-cell table:style-name="ce7" office:value-type="float" office:value="623409" calcext:value-type="float">
            <text:p>623,409</text:p>
          </table:table-cell>
          <table:table-cell table:style-name="ce6" office:value-type="string" calcext:value-type="string">
            <text:p>2032230574992060508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choquei/status/2032051504257929541/photo/1" xlink:type="simple">https://x.com/choquei/status/2032051504257929541/photo/1</text:a></text:p>
          </table:table-cell>
          <table:table-cell table:style-name="ce7" office:value-type="float" office:value="574839" calcext:value-type="float">
            <text:p>574,839</text:p>
          </table:table-cell>
          <table:table-cell table:style-name="ce6" office:value-type="string" calcext:value-type="string">
            <text:p>2032051504257929541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Serafim_zx/status/2032186223448789172" xlink:type="simple">https://x.com/Serafim_zx/status/2032186223448789172</text:a></text:p>
          </table:table-cell>
          <table:table-cell table:style-name="ce7" office:value-type="float" office:value="533411" calcext:value-type="float">
            <text:p>533,411</text:p>
          </table:table-cell>
          <table:table-cell table:style-name="ce6" office:value-type="string" calcext:value-type="string">
            <text:p>2032186223448789172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ZAMENZA/status/2031943401659097410" xlink:type="simple">https://x.com/ZAMENZA/status/2031943401659097410</text:a></text:p>
          </table:table-cell>
          <table:table-cell table:style-name="ce7" office:value-type="float" office:value="489758" calcext:value-type="float">
            <text:p>489,758</text:p>
          </table:table-cell>
          <table:table-cell table:style-name="ce6" office:value-type="string" calcext:value-type="string">
            <text:p>2031943401659097410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ErikakHilton/status/2032215526416543791" xlink:type="simple">https://x.com/ErikakHilton/status/2032215526416543791</text:a></text:p>
          </table:table-cell>
          <table:table-cell table:style-name="ce7" office:value-type="float" office:value="325900" calcext:value-type="float">
            <text:p>325,900</text:p>
          </table:table-cell>
          <table:table-cell table:style-name="ce6" office:value-type="string" calcext:value-type="string">
            <text:p>2032215526416543791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3" office:value-type="string" calcext:value-type="string">
            <text:p><text:a xlink:href="https://x.com/poponze/status/2032230484319600907/photo/1" xlink:type="simple">https://x.com/poponze/status/2032230484319600907/photo/1 </text:a></text:p>
          </table:table-cell>
          <table:table-cell table:style-name="ce7" office:value-type="float" office:value="323734" calcext:value-type="float">
            <text:p>323,734</text:p>
          </table:table-cell>
          <table:table-cell table:style-name="ce6" office:value-type="string" calcext:value-type="string">
            <text:p>2032230484319600907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centralreality/status/2032114478544773488" xlink:type="simple">https://x.com/centralreality/status/2032114478544773488</text:a></text:p>
          </table:table-cell>
          <table:table-cell table:style-name="ce7" office:value-type="float" office:value="323106" calcext:value-type="float">
            <text:p>323,106</text:p>
          </table:table-cell>
          <table:table-cell table:style-name="ce6" office:value-type="string" calcext:value-type="string">
            <text:p>2032114478544773488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ZAMENZA/status/2031908179336897006" xlink:type="simple">https://x.com/ZAMENZA/status/2031908179336897006</text:a></text:p>
          </table:table-cell>
          <table:table-cell table:style-name="ce7" office:value-type="float" office:value="285216" calcext:value-type="float">
            <text:p>285,216</text:p>
          </table:table-cell>
          <table:table-cell table:style-name="ce6" office:value-type="string" calcext:value-type="string">
            <text:p>2031908179336897006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boletimbr/status/2032213160849993811" xlink:type="simple">https://x.com/boletimbr/status/2032213160849993811</text:a></text:p>
          </table:table-cell>
          <table:table-cell table:style-name="ce7" office:value-type="float" office:value="236165" calcext:value-type="float">
            <text:p>236,165</text:p>
          </table:table-cell>
          <table:table-cell table:style-name="ce6" office:value-type="string" calcext:value-type="string">
            <text:p>2032213160849993811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grok/status/2038760479884030037" xlink:type="simple">https://x.com/RosaneBonoro/status/2038642559195492546 </text:a></text:p>
          </table:table-cell>
          <table:table-cell table:style-name="ce7" office:value-type="float" office:value="186392" calcext:value-type="float">
            <text:p>186,392</text:p>
          </table:table-cell>
          <table:table-cell table:style-name="ce6" office:value-type="string" calcext:value-type="string">
            <text:p>2038642559195492546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4" office:value-type="string" calcext:value-type="string">
            <text:p><text:a xlink:href="https://x.com/brenno__moura/status/2032215604501819789/video/1" xlink:type="simple"> https://x.com/brenno__moura/status/2032215604501819789/video/1</text:a></text:p>
          </table:table-cell>
          <table:table-cell table:style-name="ce7" office:value-type="float" office:value="168799" calcext:value-type="float">
            <text:p>168,799</text:p>
          </table:table-cell>
          <table:table-cell table:style-name="ce6" office:value-type="string" calcext:value-type="string">
            <text:p>2032215604501819789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choquei/status/2032096802392993822" xlink:type="simple">https://x.com/choquei/status/2032096802392993822</text:a></text:p>
          </table:table-cell>
          <table:table-cell table:style-name="ce7" office:value-type="float" office:value="116885" calcext:value-type="float">
            <text:p>116,885</text:p>
          </table:table-cell>
          <table:table-cell table:style-name="ce6" office:value-type="string" calcext:value-type="string">
            <text:p>2032096802392993822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revistaoeste/status/2032242659419357528" xlink:type="simple">https://x.com/revistaoeste/status/2032242659419357528</text:a></text:p>
          </table:table-cell>
          <table:table-cell table:style-name="ce7" office:value-type="float" office:value="87035" calcext:value-type="float">
            <text:p>87,035</text:p>
          </table:table-cell>
          <table:table-cell table:style-name="ce6" office:value-type="string" calcext:value-type="string">
            <text:p>2032242659419357528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euleodias/status/2032221134083510624/video/1" xlink:type="simple">https://x.com/euleodias/status/2032221134083510624/video/1</text:a></text:p>
          </table:table-cell>
          <table:table-cell table:style-name="ce7" office:value-type="float" office:value="78623" calcext:value-type="float">
            <text:p>78,623</text:p>
          </table:table-cell>
          <table:table-cell table:style-name="ce6" office:value-type="string" calcext:value-type="string">
            <text:p>2032221134083510624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centralreality/status/2032094959994647026" xlink:type="simple">https://x.com/centralreality/status/2032094959994647026</text:a></text:p>
          </table:table-cell>
          <table:table-cell table:style-name="ce7" office:value-type="float" office:value="76568" calcext:value-type="float">
            <text:p>76,568</text:p>
          </table:table-cell>
          <table:table-cell table:style-name="ce6" office:value-type="string" calcext:value-type="string">
            <text:p>2032094959994647026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NewsLiberdade/status/2032241618107990305/video/1" xlink:type="simple">https://x.com/NewsLiberdade/status/2032241618107990305/video/1</text:a></text:p>
          </table:table-cell>
          <table:table-cell table:style-name="ce7" office:value-type="float" office:value="63994" calcext:value-type="float">
            <text:p>63,994</text:p>
          </table:table-cell>
          <table:table-cell table:style-name="ce6" office:value-type="string" calcext:value-type="string">
            <text:p>2032241618107990305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flaxrmngo/status/2032218555408585148" xlink:type="simple">https://x.com/flaxrmngo/status/2032218555408585148</text:a></text:p>
          </table:table-cell>
          <table:table-cell table:style-name="ce7" office:value-type="float" office:value="63568" calcext:value-type="float">
            <text:p>63,568</text:p>
          </table:table-cell>
          <table:table-cell table:style-name="ce6" office:value-type="string" calcext:value-type="string">
            <text:p>2032218555408585148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Rafuxvideos/status/2032232804491411839" xlink:type="simple">https://x.com/Rafuxvideos/status/2032232804491411839</text:a></text:p>
          </table:table-cell>
          <table:table-cell table:style-name="ce7" office:value-type="float" office:value="58983" calcext:value-type="float">
            <text:p>58,983</text:p>
          </table:table-cell>
          <table:table-cell table:style-name="ce6" office:value-type="string" calcext:value-type="string">
            <text:p>2032232804491411839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reporterenato/status/2032232456942715204" xlink:type="simple">https://x.com/reporterenato/status/2032232456942715204</text:a></text:p>
          </table:table-cell>
          <table:table-cell table:style-name="ce7" office:value-type="float" office:value="57846" calcext:value-type="float">
            <text:p>57,846</text:p>
          </table:table-cell>
          <table:table-cell table:style-name="ce6" office:value-type="string" calcext:value-type="string">
            <text:p>2032232456942715204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jskylrk/status/2031911744835092658/video/1" xlink:type="simple">https://x.com/jskylrk/status/2031911744835092658/video/1</text:a></text:p>
          </table:table-cell>
          <table:table-cell table:style-name="ce7" office:value-type="float" office:value="55031" calcext:value-type="float">
            <text:p>55,031</text:p>
          </table:table-cell>
          <table:table-cell table:style-name="ce6" office:value-type="string" calcext:value-type="string">
            <text:p>2031915578277908647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GugaNoblat/status/2032241452068008236" xlink:type="simple">https://x.com/GugaNoblat/status/2032241452068008236</text:a></text:p>
          </table:table-cell>
          <table:table-cell table:style-name="ce7" office:value-type="float" office:value="54990" calcext:value-type="float">
            <text:p>54,990</text:p>
          </table:table-cell>
          <table:table-cell table:style-name="ce6" office:value-type="string" calcext:value-type="string">
            <text:p>2032241452068008236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pabllovbrasil/status/2032228718429487114" xlink:type="simple">https://x.com/pabllovbrasil/status/2032228718429487114</text:a></text:p>
          </table:table-cell>
          <table:table-cell table:style-name="ce7" office:value-type="float" office:value="54701" calcext:value-type="float">
            <text:p>54,701</text:p>
          </table:table-cell>
          <table:table-cell table:style-name="ce6" office:value-type="string" calcext:value-type="string">
            <text:p>2032228718429487114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NewsLiberdade/status/2038200246480633970/video/1" xlink:type="simple">https://x.com/NewsLiberdade/status/2038200246480633970/video/1</text:a></text:p>
          </table:table-cell>
          <table:table-cell table:style-name="ce7" office:value-type="float" office:value="54382" calcext:value-type="float">
            <text:p>54,382</text:p>
          </table:table-cell>
          <table:table-cell table:style-name="ce6" office:value-type="string" calcext:value-type="string">
            <text:p>2038200246480633970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Serafim_zx/status/2032186223448789172" xlink:type="simple">https://x.com/Serafim_zx/status/2032186223448789172</text:a></text:p>
          </table:table-cell>
          <table:table-cell table:style-name="ce7" office:value-type="float" office:value="49972" calcext:value-type="float">
            <text:p>49,972</text:p>
          </table:table-cell>
          <table:table-cell table:style-name="ce6" office:value-type="string" calcext:value-type="string">
            <text:p>2032206684756570621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3" office:value-type="string" calcext:value-type="string">
            <text:p><text:a xlink:href="https://x.com/falamuka/status/2032237227023958277" xlink:type="simple">https://x.com/falamuka/status/2032237227023958277 </text:a></text:p>
          </table:table-cell>
          <table:table-cell table:style-name="ce7" office:value-type="float" office:value="48602" calcext:value-type="float">
            <text:p>48,602</text:p>
          </table:table-cell>
          <table:table-cell table:style-name="ce6" office:value-type="string" calcext:value-type="string">
            <text:p>2032237227023958277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vinicios_betiol/status/2034374152308588559/video/1" xlink:type="simple">https://x.com/vinicios_betiol/status/2034374152308588559/video/1</text:a></text:p>
          </table:table-cell>
          <table:table-cell table:style-name="ce7" office:value-type="float" office:value="45914" calcext:value-type="float">
            <text:p>45,914</text:p>
          </table:table-cell>
          <table:table-cell table:style-name="ce6" office:value-type="string" calcext:value-type="string">
            <text:p>2038756665252520118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3" office:value-type="string" calcext:value-type="string">
            <text:p><text:a xlink:href="https://t.co/aoFOw6yN5W" xlink:type="simple">https://x.com/EleicaoBr2026/status/2032223691413541365/video/1 </text:a></text:p>
          </table:table-cell>
          <table:table-cell table:style-name="ce7" office:value-type="float" office:value="45129" calcext:value-type="float">
            <text:p>45,129</text:p>
          </table:table-cell>
          <table:table-cell table:style-name="ce6" office:value-type="string" calcext:value-type="string">
            <text:p>2032223691413541365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Realndependence/status/2032230220095266939/video/1" xlink:type="simple">https://x.com/Realndependence/status/2032230220095266939/video/1</text:a></text:p>
          </table:table-cell>
          <table:table-cell table:style-name="ce7" office:value-type="float" office:value="40853" calcext:value-type="float">
            <text:p>40,853</text:p>
          </table:table-cell>
          <table:table-cell table:style-name="ce6" office:value-type="string" calcext:value-type="string">
            <text:p>2032230220095266939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bralternativo_/status/2032233617452384374" xlink:type="simple">https://x.com/bralternativo_/status/2032233617452384374</text:a></text:p>
          </table:table-cell>
          <table:table-cell table:style-name="ce7" office:value-type="float" office:value="39622" calcext:value-type="float">
            <text:p>39,622</text:p>
          </table:table-cell>
          <table:table-cell table:style-name="ce6" office:value-type="string" calcext:value-type="string">
            <text:p>2032233617452384374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Rafayse/status/2032235409187451314" xlink:type="simple">https://x.com/Rafayse/status/2032235409187451314</text:a></text:p>
          </table:table-cell>
          <table:table-cell table:style-name="ce7" office:value-type="float" office:value="37923" calcext:value-type="float">
            <text:p>37,923</text:p>
          </table:table-cell>
          <table:table-cell table:style-name="ce6" office:value-type="string" calcext:value-type="string">
            <text:p>2032235409187451314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TumultoBR/status/2038066858860171543/video/1" xlink:type="simple">https://x.com/TumultoBR/status/2038066858860171543/video/1</text:a></text:p>
          </table:table-cell>
          <table:table-cell table:style-name="ce7" office:value-type="float" office:value="35147" calcext:value-type="float">
            <text:p>35,147</text:p>
          </table:table-cell>
          <table:table-cell table:style-name="ce6" office:value-type="string" calcext:value-type="string">
            <text:p>2038066858860171543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roberta_bastoss/status/2032226513869836679/video/1" xlink:type="simple">https://x.com/roberta_bastoss/status/2032226513869836679/video/1</text:a></text:p>
          </table:table-cell>
          <table:table-cell table:style-name="ce7" office:value-type="float" office:value="33738" calcext:value-type="float">
            <text:p>33,738</text:p>
          </table:table-cell>
          <table:table-cell table:style-name="ce6" office:value-type="string" calcext:value-type="string">
            <text:p>2032226513869836679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poptime/status/2032217898853261334" xlink:type="simple">https://x.com/uumlibriano/status/2032219028656214339/photo/1</text:a></text:p>
          </table:table-cell>
          <table:table-cell table:style-name="ce7" office:value-type="float" office:value="33393" calcext:value-type="float">
            <text:p>33,393</text:p>
          </table:table-cell>
          <table:table-cell table:style-name="ce6" office:value-type="string" calcext:value-type="string">
            <text:p>2032219028656214339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andxxer/status/2032218234519245253" xlink:type="simple">https://x.com/andxxer/status/2032218234519245253</text:a></text:p>
          </table:table-cell>
          <table:table-cell table:style-name="ce7" office:value-type="float" office:value="32145" calcext:value-type="float">
            <text:p>32,145</text:p>
          </table:table-cell>
          <table:table-cell table:style-name="ce6" office:value-type="string" calcext:value-type="string">
            <text:p>2032218234519245253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forumbunklr/status/2032192959744033224/photo/1" xlink:type="simple">https://x.com/forumbunklr/status/2032192959744033224/photo/1</text:a></text:p>
          </table:table-cell>
          <table:table-cell table:style-name="ce7" office:value-type="float" office:value="26984" calcext:value-type="float">
            <text:p>26,984</text:p>
          </table:table-cell>
          <table:table-cell table:style-name="ce6" office:value-type="string" calcext:value-type="string">
            <text:p>2032192959744033224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cynaramenezes/status/2032119032841675166" xlink:type="simple">https://x.com/cynaramenezes/status/2032119032841675166</text:a></text:p>
          </table:table-cell>
          <table:table-cell table:style-name="ce7" office:value-type="float" office:value="25856" calcext:value-type="float">
            <text:p>25,856</text:p>
          </table:table-cell>
          <table:table-cell table:style-name="ce6" office:value-type="string" calcext:value-type="string">
            <text:p>2032119032841675166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Metropoles/status/2032241477930090512" xlink:type="simple">https://x.com/Metropoles/status/2032241477930090512</text:a></text:p>
          </table:table-cell>
          <table:table-cell table:style-name="ce7" office:value-type="float" office:value="24156" calcext:value-type="float">
            <text:p>24,156</text:p>
          </table:table-cell>
          <table:table-cell table:style-name="ce6" office:value-type="string" calcext:value-type="string">
            <text:p>2032241477930090512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Leonard86315588/status/2032218053639872619" xlink:type="simple">https://x.com/Leonard86315588/status/2032218053639872619</text:a></text:p>
          </table:table-cell>
          <table:table-cell table:style-name="ce7" office:value-type="float" office:value="23504" calcext:value-type="float">
            <text:p>23,504</text:p>
          </table:table-cell>
          <table:table-cell table:style-name="ce6" office:value-type="string" calcext:value-type="string">
            <text:p>2032218053639872619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BarbozzRamon/status/2031912517803388993" xlink:type="simple">https://x.com/BarbozzRamon/status/2031912517803388993</text:a></text:p>
          </table:table-cell>
          <table:table-cell table:style-name="ce7" office:value-type="float" office:value="23148" calcext:value-type="float">
            <text:p>23,148</text:p>
          </table:table-cell>
          <table:table-cell table:style-name="ce6" office:value-type="string" calcext:value-type="string">
            <text:p>2031912517803388993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luiscelsomaia/status/2032056056059142499" xlink:type="simple">https://x.com/luiscelsomaia/status/2032056056059142499</text:a></text:p>
          </table:table-cell>
          <table:table-cell table:style-name="ce7" office:value-type="float" office:value="22922" calcext:value-type="float">
            <text:p>22,922</text:p>
          </table:table-cell>
          <table:table-cell table:style-name="ce6" office:value-type="string" calcext:value-type="string">
            <text:p>2032056056059142499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ivandiariamente/status/2031914612224872666" xlink:type="simple">https://x.com/ivandiariamente/status/2031914612224872666</text:a></text:p>
          </table:table-cell>
          <table:table-cell table:style-name="ce7" office:value-type="float" office:value="22492" calcext:value-type="float">
            <text:p>22,492</text:p>
          </table:table-cell>
          <table:table-cell table:style-name="ce6" office:value-type="string" calcext:value-type="string">
            <text:p>2031914612224872666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revistaoeste/status/2038063700813173134" xlink:type="simple">https://x.com/revistaoeste/status/2038063700813173134</text:a></text:p>
          </table:table-cell>
          <table:table-cell table:style-name="ce7" office:value-type="float" office:value="22392" calcext:value-type="float">
            <text:p>22,392</text:p>
          </table:table-cell>
          <table:table-cell table:style-name="ce6" office:value-type="string" calcext:value-type="string">
            <text:p>2038063700813173134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jordannvicente/status/2032212312107471207/photo/1" xlink:type="simple">https://x.com/jordannvicente/status/2032212312107471207/photo/1</text:a></text:p>
          </table:table-cell>
          <table:table-cell table:style-name="ce7" office:value-type="float" office:value="22254" calcext:value-type="float">
            <text:p>22,254</text:p>
          </table:table-cell>
          <table:table-cell table:style-name="ce6" office:value-type="string" calcext:value-type="string">
            <text:p>2032212312107471207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manicomiland/status/2031958947033121047" xlink:type="simple">https://x.com/manicomiland/status/2031958947033121047 </text:a></text:p>
          </table:table-cell>
          <table:table-cell table:style-name="ce7" office:value-type="float" office:value="21364" calcext:value-type="float">
            <text:p>21,364</text:p>
          </table:table-cell>
          <table:table-cell table:style-name="ce6" office:value-type="string" calcext:value-type="string">
            <text:p>2031958947033121047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enguaria/status/2031918742884532647/photo/1" xlink:type="simple">https://x.com/enguaria/status/2031918742884532647/photo/1</text:a></text:p>
          </table:table-cell>
          <table:table-cell table:style-name="ce7" office:value-type="float" office:value="21192" calcext:value-type="float">
            <text:p>21,192</text:p>
          </table:table-cell>
          <table:table-cell table:style-name="ce6" office:value-type="string" calcext:value-type="string">
            <text:p>2031918742884532647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migwinomustdie/status/2038564064922599698/photo/1" xlink:type="simple">https://x.com/migwinomustdie/status/2038564064922599698/photo/1</text:a></text:p>
          </table:table-cell>
          <table:table-cell table:style-name="ce7" office:value-type="float" office:value="21030" calcext:value-type="float">
            <text:p>21,030</text:p>
          </table:table-cell>
          <table:table-cell table:style-name="ce6" office:value-type="string" calcext:value-type="string">
            <text:p>2038564064922599698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5" office:value-type="string" calcext:value-type="string">
            <text:p><text:a xlink:href="https://x.com/artpopjuridico/status/2031902278232269058" xlink:type="simple">https://x.com/artpopjuridico/status/2031902278232269058</text:a></text:p>
          </table:table-cell>
          <table:table-cell table:style-name="ce7" office:value-type="float" office:value="20572" calcext:value-type="float">
            <text:p>20,572</text:p>
          </table:table-cell>
          <table:table-cell table:style-name="ce6" office:value-type="string" calcext:value-type="string">
            <text:p>2031902278232269058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RighetiFernando/status/2031915606094594072" xlink:type="simple">https://x.com/RighetiFernando/status/2031915606094594072</text:a></text:p>
          </table:table-cell>
          <table:table-cell table:style-name="ce7" office:value-type="float" office:value="19990" calcext:value-type="float">
            <text:p>19,990</text:p>
          </table:table-cell>
          <table:table-cell table:style-name="ce6" office:value-type="string" calcext:value-type="string">
            <text:p>2031915606094594072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5" office:value-type="string" calcext:value-type="string">
            <text:p><text:a xlink:href="https://t.co/1IU7kV6J68" xlink:type="simple">https://t.co/1IU7kV6J68 </text:a></text:p>
          </table:table-cell>
          <table:table-cell table:style-name="ce7" office:value-type="float" office:value="19603" calcext:value-type="float">
            <text:p>19,603</text:p>
          </table:table-cell>
          <table:table-cell table:style-name="ce6" office:value-type="string" calcext:value-type="string">
            <text:p>2038723911408345596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5" office:value-type="string" calcext:value-type="string">
            <text:p><text:a xlink:href="https://x.com/extolmyfavs/status/2031902327679173104" xlink:type="simple">https://x.com/extolmyfavs/status/2031902327679173104</text:a></text:p>
          </table:table-cell>
          <table:table-cell table:style-name="ce7" office:value-type="float" office:value="19028" calcext:value-type="float">
            <text:p>19,028</text:p>
          </table:table-cell>
          <table:table-cell table:style-name="ce6" office:value-type="string" calcext:value-type="string">
            <text:p>2031902327679173104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lucaspasin/status/2032137321848435032" xlink:type="simple">https://x.com/lucaspasin/status/2032137321848435032</text:a></text:p>
          </table:table-cell>
          <table:table-cell table:style-name="ce7" office:value-type="float" office:value="18349" calcext:value-type="float">
            <text:p>18,349</text:p>
          </table:table-cell>
          <table:table-cell table:style-name="ce6" office:value-type="string" calcext:value-type="string">
            <text:p>2032137321848435032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x.com/junior_dirlan/status/2031919931743252657" xlink:type="simple">https://x.com/junior_dirlan/status/2031919931743252657</text:a></text:p>
          </table:table-cell>
          <table:table-cell table:style-name="ce7" office:value-type="float" office:value="34672" calcext:value-type="float">
            <text:p>34,672</text:p>
          </table:table-cell>
          <table:table-cell table:style-name="ce6" office:value-type="string" calcext:value-type="string">
            <text:p>2031919931743252657</text:p>
          </table:table-cell>
          <table:table-cell table:style-name="ce6" table:number-columns-repeated="13"/>
          <table:table-cell table:number-columns-repeated="1008"/>
        </table:table-row>
        <table:table-row table:style-name="ro1" table:number-rows-repeated="941">
          <table:table-cell table:style-name="ce6" table:number-columns-repeated="16"/>
          <table:table-cell table:number-columns-repeated="1008"/>
        </table:table-row>
        <table:table-row table:style-name="ro1" table:number-rows-repeated="3">
          <table:table-cell table:style-name="ce6" table:number-columns-repeated="16"/>
          <table:table-cell table:number-columns-repeated="100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8" meta:object-count="0"/>
    <meta:generator>LibreOfficeDev/6.0.5.2$Linux_X86_64 LibreOffice_project/</meta:generator>
  </office:meta>
</office:document-meta>
</file>